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0000000645F492CCF.png" manifest:media-type="image/png"/>
  <manifest:file-entry manifest:full-path="Pictures/1001F838000027AF00000A52BD1B39E7.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ITC Giovanni Std Book" svg:font-family="'ITC Giovanni Std Book'" style:font-family-generic="roman" style:font-pitch="variable"/>
    <style:font-face style:name="Liberation Sans" svg:font-family="'Liberation Sans'" style:font-family-generic="swiss" style:font-pitch="variable"/>
    <style:font-face style:name="New Times Roman" svg:font-family="'New Times 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Table1" style:family="table">
      <style:table-properties style:width="6.6354in" fo:margin-left="0.0104in" fo:margin-top="0in" fo:margin-bottom="0in" table:align="left" style:writing-mode="page"/>
    </style:style>
    <style:style style:name="Table1.A" style:family="table-column">
      <style:table-column-properties style:column-width="3.3125in"/>
    </style:style>
    <style:style style:name="Table1.B" style:family="table-column">
      <style:table-column-properties style:column-width="3.322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style>
    <style:style style:name="Table2" style:family="table">
      <style:table-properties style:width="6.65in" fo:margin-left="0.0035in" fo:margin-top="0in" fo:margin-bottom="0in" table:align="left" style:writing-mode="page"/>
    </style:style>
    <style:style style:name="Table2.A" style:family="table-column">
      <style:table-column-properties style:column-width="2.216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bfbfbf"/>
    </style:style>
    <style:style style:name="Table3" style:family="table">
      <style:table-properties style:width="6.6354in" fo:margin-left="0.0104in" fo:margin-top="0in" fo:margin-bottom="0in" table:align="left" style:writing-mode="page"/>
    </style:style>
    <style:style style:name="Table3.A" style:family="table-column">
      <style:table-column-properties style:column-width="3.3125in"/>
    </style:style>
    <style:style style:name="Table3.B" style:family="table-column">
      <style:table-column-properties style:column-width="3.322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bfbfbf"/>
    </style:style>
    <style:style style:name="Table4" style:family="table">
      <style:table-properties style:width="6.6354in" fo:margin-left="0.0104in" fo:margin-top="0in" fo:margin-bottom="0in" table:align="left" style:writing-mode="page"/>
    </style:style>
    <style:style style:name="Table4.A" style:family="table-column">
      <style:table-column-properties style:column-width="3.3125in"/>
    </style:style>
    <style:style style:name="Table4.B" style:family="table-column">
      <style:table-column-properties style:column-width="3.322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bfbfbf"/>
    </style:style>
    <style:style style:name="Table5" style:family="table">
      <style:table-properties style:width="6.6354in" fo:margin-left="0.0104in" fo:margin-top="0in" fo:margin-bottom="0in" table:align="left" style:writing-mode="page"/>
    </style:style>
    <style:style style:name="Table5.A" style:family="table-column">
      <style:table-column-properties style:column-width="3.3125in"/>
    </style:style>
    <style:style style:name="Table5.B" style:family="table-column">
      <style:table-column-properties style:column-width="3.322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bfbfbf"/>
    </style:style>
    <style:style style:name="Table6" style:family="table">
      <style:table-properties style:width="6.65in" fo:margin-left="0.0035in" fo:margin-top="0in" fo:margin-bottom="0in" table:align="left" style:writing-mode="page"/>
    </style:style>
    <style:style style:name="Table6.A" style:family="table-column">
      <style:table-column-properties style:column-width="2.2167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bfbfbf"/>
    </style:style>
    <style:style style:name="P1" style:family="paragraph" style:parent-style-name="Plain_20_Text">
      <style:text-properties fo:font-size="11pt" style:font-size-asian="11pt" style:font-size-complex="11pt"/>
    </style:style>
    <style:style style:name="P2" style:family="paragraph" style:parent-style-name="Plain_20_Text">
      <style:paragraph-properties fo:text-align="center" style:justify-single-word="false"/>
    </style:style>
    <style:style style:name="P3" style:family="paragraph" style:parent-style-name="Plain_20_Text">
      <style:text-properties style:font-name="ITC Giovanni Std Book" fo:font-size="12pt" style:font-size-asian="12pt" style:font-name-complex="Times New Roman1" style:font-size-complex="12pt"/>
    </style:style>
    <style:style style:name="P4" style:family="paragraph" style:parent-style-name="Plain_20_Text">
      <style:text-properties style:font-name="ITC Giovanni Std Book" fo:font-size="12pt" officeooo:rsid="000f0e00" officeooo:paragraph-rsid="000f0e00" style:font-size-asian="12pt" style:font-name-complex="Times New Roman1" style:font-size-complex="12pt"/>
    </style:style>
    <style:style style:name="P5" style:family="paragraph" style:parent-style-name="Plain_20_Text">
      <style:text-properties style:font-name="ITC Giovanni Std Book" fo:font-size="12pt" officeooo:rsid="00120f3c" officeooo:paragraph-rsid="00120f3c" style:font-size-asian="12pt" style:font-name-complex="Times New Roman1" style:font-size-complex="12pt"/>
    </style:style>
    <style:style style:name="P6" style:family="paragraph" style:parent-style-name="Plain_20_Text">
      <style:text-properties style:font-name="ITC Giovanni Std Book" fo:font-size="12pt" fo:font-style="italic" style:font-size-asian="12pt" style:font-style-asian="italic" style:font-name-complex="Times New Roman1" style:font-size-complex="12pt" style:font-style-complex="italic"/>
    </style:style>
    <style:style style:name="P7" style:family="paragraph" style:parent-style-name="Plain_20_Text">
      <style:text-properties style:font-name="Times New Roman" fo:font-size="12pt" fo:font-style="italic" style:font-size-asian="12pt" style:font-style-asian="italic" style:font-name-complex="Times New Roman1" style:font-size-complex="12pt" style:font-style-complex="italic"/>
    </style:style>
    <style:style style:name="P8" style:family="paragraph" style:parent-style-name="Plain_20_Text">
      <style:text-properties style:font-name="Times New Roman" fo:font-size="12pt" style:font-size-asian="12pt" style:font-name-complex="Times New Roman1" style:font-size-complex="12pt"/>
    </style:style>
    <style:style style:name="P9" style:family="paragraph" style:parent-style-name="Plain_20_Text">
      <style:text-properties style:font-name="Times New Roman" fo:font-size="12pt" officeooo:paragraph-rsid="001037c3" style:font-size-asian="12pt" style:font-name-complex="Times New Roman1" style:font-size-complex="12pt"/>
    </style:style>
    <style:style style:name="P10" style:family="paragraph" style:parent-style-name="Plain_20_Text">
      <style:text-properties style:font-name="Times New Roman" fo:font-size="12pt" fo:font-weight="bold" style:font-size-asian="12pt" style:font-weight-asian="bold" style:font-name-complex="Times New Roman1" style:font-size-complex="12pt"/>
    </style:style>
    <style:style style:name="P11" style:family="paragraph" style:parent-style-name="Plain_20_Text">
      <style:text-properties style:font-name="TimesNewRomanPSMT" fo:font-style="italic" style:letter-kerning="true" style:font-style-asian="italic" style:font-name-complex="TimesNewRomanPSMT1" style:font-style-complex="italic"/>
    </style:style>
    <style:style style:name="P12" style:family="paragraph" style:parent-style-name="Plain_20_Text">
      <style:text-properties fo:font-weight="bold" style:font-weight-asian="bold" style:font-weight-complex="bold"/>
    </style:style>
    <style:style style:name="P13" style:family="paragraph" style:parent-style-name="Plain_20_Text">
      <style:text-properties fo:font-weight="bold" officeooo:paragraph-rsid="00120f3c" style:font-weight-asian="bold" style:font-weight-complex="bold"/>
    </style:style>
    <style:style style:name="P14" style:family="paragraph" style:parent-style-name="Plain_20_Text">
      <style:text-properties officeooo:paragraph-rsid="001037c3"/>
    </style:style>
    <style:style style:name="P15" style:family="paragraph" style:parent-style-name="Plain_20_Text">
      <style:paragraph-properties fo:text-indent="0.5in" style:auto-text-indent="false"/>
      <style:text-properties officeooo:paragraph-rsid="001037c3"/>
    </style:style>
    <style:style style:name="P16" style:family="paragraph" style:parent-style-name="Plain_20_Text">
      <style:text-properties officeooo:paragraph-rsid="00120f3c"/>
    </style:style>
    <style:style style:name="P17" style:family="paragraph" style:parent-style-name="Standard">
      <style:paragraph-properties fo:text-align="end" style:justify-single-word="false"/>
    </style:style>
    <style:style style:name="P18" style:family="paragraph" style:parent-style-name="Standard">
      <style:paragraph-properties fo:margin-top="0.0835in" fo:margin-bottom="0in" style:contextual-spacing="false" fo:text-align="end" style:justify-single-word="false"/>
    </style:style>
    <style:style style:name="P19" style:family="paragraph" style:parent-style-name="Standard">
      <style:paragraph-properties fo:margin-top="0.0555in" fo:margin-bottom="0in" style:contextual-spacing="false" fo:text-align="end" style:justify-single-word="false"/>
    </style:style>
    <style:style style:name="P20" style:family="paragraph" style:parent-style-name="Standard">
      <style:paragraph-properties style:line-height-at-least="0.1665in" fo:orphans="0" fo:widows="0"/>
      <style:text-properties style:font-name="TimesNewRomanPSMT" fo:font-style="italic" style:letter-kerning="true" style:font-style-asian="italic" style:font-name-complex="TimesNewRomanPSMT1" style:font-style-complex="italic"/>
    </style:style>
    <style:style style:name="P21" style:family="paragraph" style:parent-style-name="Standard">
      <style:paragraph-properties style:line-height-at-least="0.1665in" fo:orphans="0" fo:widows="0"/>
      <style:text-properties style:font-name="TimesNewRomanPSMT" fo:font-style="italic" officeooo:paragraph-rsid="000f0e00" style:letter-kerning="true" style:font-style-asian="italic" style:font-name-complex="TimesNewRomanPSMT1" style:font-style-complex="italic"/>
    </style:style>
    <style:style style:name="P22" style:family="paragraph" style:parent-style-name="Standard">
      <style:paragraph-properties style:line-height-at-least="0.1665in" fo:orphans="0" fo:widows="0"/>
      <style:text-properties style:font-name="TimesNewRomanPSMT" style:letter-kerning="true" style:font-name-complex="TimesNewRomanPSMT1"/>
    </style:style>
    <style:style style:name="P23" style:family="paragraph" style:parent-style-name="Standard">
      <style:paragraph-properties style:line-height-at-least="0.1665in" fo:orphans="0" fo:widows="0"/>
      <style:text-properties style:font-name="TimesNewRomanPSMT" officeooo:paragraph-rsid="000f0e00" style:letter-kerning="true" style:font-name-complex="TimesNewRomanPSMT1"/>
    </style:style>
    <style:style style:name="P24" style:family="paragraph" style:parent-style-name="Standard">
      <style:paragraph-properties fo:orphans="0" fo:widows="0"/>
      <style:text-properties style:font-name="TimesNewRomanPSMT" fo:font-size="10pt" style:letter-kerning="true" style:font-size-asian="10pt" style:font-name-complex="TimesNewRomanPSMT1" style:font-size-complex="10pt"/>
    </style:style>
    <style:style style:name="P25" style:family="paragraph" style:parent-style-name="Standard">
      <style:paragraph-properties fo:orphans="0" fo:widows="0"/>
      <style:text-properties style:font-name="TimesNewRomanPSMT" fo:font-size="10pt" officeooo:paragraph-rsid="000f0e00" style:letter-kerning="true" style:font-size-asian="10pt" style:font-name-complex="TimesNewRomanPSMT1" style:font-size-complex="10pt"/>
    </style:style>
    <style:style style:name="P26" style:family="paragraph" style:parent-style-name="Standard">
      <style:paragraph-properties style:line-height-at-least="0.1665in" fo:orphans="0" fo:widows="0"/>
    </style:style>
    <style:style style:name="P27" style:family="paragraph" style:parent-style-name="Standard">
      <style:paragraph-properties fo:orphans="0" fo:widows="0"/>
    </style:style>
    <style:style style:name="P28" style:family="paragraph" style:parent-style-name="Standard">
      <style:text-properties style:font-name="ITC Giovanni Std Book" fo:font-size="12pt" officeooo:paragraph-rsid="000f0e00" style:font-size-asian="12pt" style:font-name-complex="Times New Roman1" style:font-size-complex="12pt"/>
    </style:style>
    <style:style style:name="P29" style:family="paragraph" style:parent-style-name="Standard">
      <style:paragraph-properties style:line-height-at-least="0.1665in" fo:orphans="0" fo:widows="0"/>
      <style:text-properties fo:font-weight="bold" style:font-weight-asian="bold" style:font-weight-complex="bold"/>
    </style:style>
    <style:style style:name="P30" style:family="paragraph" style:parent-style-name="Text_20_body">
      <style:paragraph-properties style:line-height-at-least="0.1665in" fo:orphans="0" fo:widows="0"/>
      <style:text-properties style:font-name="TimesNewRomanPSMT" fo:font-style="italic" style:letter-kerning="true" style:font-style-asian="italic" style:font-name-complex="TimesNewRomanPSMT1" style:font-style-complex="italic"/>
    </style:style>
    <style:style style:name="P31" style:family="paragraph" style:parent-style-name="Text_20_body">
      <style:paragraph-properties fo:orphans="0" fo:widows="0"/>
      <style:text-properties style:font-name="TimesNewRomanPSMT" fo:font-size="10pt" officeooo:paragraph-rsid="000f0e00" style:letter-kerning="true" style:font-size-asian="10pt" style:font-name-complex="TimesNewRomanPSMT1" style:font-size-complex="10pt"/>
    </style:style>
    <style:style style:name="P32" style:family="paragraph" style:parent-style-name="Text_20_body" style:list-style-name="L6"/>
    <style:style style:name="P33" style:family="paragraph" style:parent-style-name="Text_20_body" style:list-style-name="L6">
      <style:paragraph-properties fo:margin-top="0in" fo:margin-bottom="0in" style:contextual-spacing="false"/>
    </style:style>
    <style:style style:name="P34" style:family="paragraph" style:parent-style-name="Text_20_body">
      <style:text-properties style:font-name="ITC Giovanni Std Book" fo:font-size="12pt" fo:font-style="italic" style:font-size-asian="12pt" style:font-style-asian="italic" style:font-name-complex="Times New Roman1" style:font-size-complex="12pt" style:font-style-complex="italic"/>
    </style:style>
    <style:style style:name="P35" style:family="paragraph" style:parent-style-name="Text_20_body" style:list-style-name="L7">
      <style:paragraph-properties fo:margin-top="0in" fo:margin-bottom="0in" style:contextual-spacing="false"/>
      <style:text-properties fo:font-style="italic" style:font-style-asian="italic" style:font-style-complex="italic"/>
    </style:style>
    <style:style style:name="P36" style:family="paragraph" style:parent-style-name="Text_20_body" style:list-style-name="L7">
      <style:text-properties fo:font-style="italic" style:font-style-asian="italic" style:font-style-complex="italic"/>
    </style:style>
    <style:style style:name="P37" style:family="paragraph" style:parent-style-name="Text_20_body">
      <style:text-properties fo:font-style="italic" style:font-style-asian="italic" style:font-style-complex="italic"/>
    </style:style>
    <style:style style:name="P38" style:family="paragraph" style:parent-style-name="Text_20_body" style:list-style-name="L8">
      <style:paragraph-properties fo:margin-top="0in" fo:margin-bottom="0in" style:contextual-spacing="false"/>
      <style:text-properties fo:font-style="italic" style:font-style-asian="italic" style:font-style-complex="italic"/>
    </style:style>
    <style:style style:name="P39" style:family="paragraph" style:parent-style-name="Text_20_body" style:list-style-name="L8">
      <style:text-properties fo:font-style="italic" style:font-style-asian="italic" style:font-style-complex="italic"/>
    </style:style>
    <style:style style:name="P40" style:family="paragraph" style:parent-style-name="Text_20_body">
      <style:text-properties style:font-name="Times New Roman" fo:font-size="12pt" style:font-size-asian="12pt" style:font-name-complex="Times New Roman1" style:font-size-complex="12pt"/>
    </style:style>
    <style:style style:name="T1" style:family="text">
      <style:text-properties fo:font-size="11pt" style:font-size-asian="11pt" style:font-size-complex="11pt"/>
    </style:style>
    <style:style style:name="T2" style:family="text">
      <style:text-properties style:font-name="ITC Giovanni Std Book" fo:font-size="9pt" fo:font-weight="bold" style:font-size-asian="9pt" style:font-weight-asian="bold" style:font-size-complex="9pt"/>
    </style:style>
    <style:style style:name="T3" style:family="text">
      <style:text-properties style:font-name="ITC Giovanni Std Book" fo:font-size="9pt" fo:font-style="italic" style:font-size-asian="9pt" style:font-style-asian="italic" style:font-size-complex="9pt"/>
    </style:style>
    <style:style style:name="T4" style:family="text">
      <style:text-properties style:font-name="ITC Giovanni Std Book" fo:font-size="9pt" style:font-size-asian="9pt" style:font-size-complex="9pt"/>
    </style:style>
    <style:style style:name="T5" style:family="text">
      <style:text-properties style:font-name="ITC Giovanni Std Book" fo:font-size="12pt" fo:font-weight="bold" style:font-size-asian="12pt" style:font-weight-asian="bold" style:font-name-complex="Times New Roman1" style:font-size-complex="12pt" style:font-weight-complex="bold"/>
    </style:style>
    <style:style style:name="T6" style:family="text">
      <style:text-properties style:font-name="ITC Giovanni Std Book" fo:font-size="12pt" style:font-size-asian="12pt" style:font-name-complex="Times New Roman1" style:font-size-complex="12pt"/>
    </style:style>
    <style:style style:name="T7" style:family="text">
      <style:text-properties style:font-name="ITC Giovanni Std Book" fo:font-size="12pt" officeooo:rsid="000f0e00" style:font-size-asian="12pt" style:font-name-complex="Times New Roman1" style:font-size-complex="12pt"/>
    </style:style>
    <style:style style:name="T8" style:family="text">
      <style:text-properties style:font-name="ITC Giovanni Std Book" fo:font-size="12pt" fo:font-style="italic" style:font-size-asian="12pt" style:font-style-asian="italic" style:font-name-complex="Times New Roman1" style:font-size-complex="12pt" style:font-style-complex="italic"/>
    </style:style>
    <style:style style:name="T9" style:family="text">
      <style:text-properties style:font-name="ITC Giovanni Std Book" fo:font-size="12pt" fo:font-style="italic" officeooo:rsid="000f0e00" style:font-size-asian="12pt" style:font-style-asian="italic" style:font-name-complex="Times New Roman1" style:font-size-complex="12pt" style:font-style-complex="italic"/>
    </style:style>
    <style:style style:name="T10" style:family="text">
      <style:text-properties style:font-name="ITC Giovanni Std Book" fo:font-size="12pt" fo:font-style="italic" officeooo:rsid="00120f3c" style:font-size-asian="12pt" style:font-style-asian="italic" style:font-name-complex="Times New Roman1" style:font-size-complex="12pt" style:font-style-complex="italic"/>
    </style:style>
    <style:style style:name="T11" style:family="text">
      <style:text-properties style:font-name="ITC Giovanni Std Book" fo:font-size="12pt" fo:font-style="italic" fo:font-weight="bold" style:font-size-asian="12pt" style:font-style-asian="italic" style:font-weight-asian="bold" style:font-name-complex="Times New Roman1" style:font-size-complex="12pt" style:font-style-complex="italic" style:font-weight-complex="bold"/>
    </style:style>
    <style:style style:name="T12" style:family="text">
      <style:text-properties style:font-name="ITC Giovanni Std Book" fo:font-size="12pt" fo:font-style="italic" fo:font-weight="bold" officeooo:rsid="00120f3c" style:font-size-asian="12pt" style:font-style-asian="italic" style:font-weight-asian="bold" style:font-name-complex="Times New Roman1" style:font-size-complex="12pt" style:font-style-complex="italic" style:font-weight-complex="bold"/>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officeooo:rsid="001037c3" style:font-size-asian="12pt"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font-style-complex="italic"/>
    </style:style>
    <style:style style:name="T16"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7"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18" style:family="text">
      <style:text-properties style:font-name="Times New Roman" fo:font-size="12pt" fo:font-weight="bold" style:font-size-asian="12pt" style:font-weight-asian="bold" style:font-name-complex="Times New Roman1" style:font-size-complex="12pt"/>
    </style:style>
    <style:style style:name="T19" style:family="text">
      <style:text-properties style:font-name="TimesNewRomanPSMT" fo:font-style="italic" style:letter-kerning="true" style:font-style-asian="italic" style:font-name-complex="TimesNewRomanPSMT1" style:font-style-complex="italic"/>
    </style:style>
    <style:style style:name="T20" style:family="text">
      <style:text-properties style:font-name="TimesNewRomanPSMT" fo:font-style="italic" style:text-underline-style="solid" style:text-underline-width="auto" style:text-underline-color="font-color" style:letter-kerning="true" style:font-style-asian="italic" style:font-name-complex="TimesNewRomanPSMT1" style:font-style-complex="italic"/>
    </style:style>
    <style:style style:name="T21" style:family="text">
      <style:text-properties style:font-name="TimesNewRomanPSMT" fo:font-style="italic" fo:font-weight="bold" style:letter-kerning="true" style:font-style-asian="italic" style:font-weight-asian="bold" style:font-name-complex="TimesNewRomanPSMT1" style:font-style-complex="italic" style:font-weight-complex="bold"/>
    </style:style>
    <style:style style:name="T22" style:family="text">
      <style:text-properties style:font-name="TimesNewRomanPSMT" fo:font-style="italic" fo:font-weight="normal" officeooo:rsid="000f0e00" style:letter-kerning="true" style:font-style-asian="italic" style:font-weight-asian="normal" style:font-name-complex="TimesNewRomanPSMT1" style:font-style-complex="italic" style:font-weight-complex="normal"/>
    </style:style>
    <style:style style:name="T23" style:family="text">
      <style:text-properties style:font-name="TimesNewRomanPSMT" style:letter-kerning="true" style:font-name-complex="TimesNewRomanPSMT1"/>
    </style:style>
    <style:style style:name="T24" style:family="text">
      <style:text-properties style:font-name="TimesNewRomanPSMT" fo:font-weight="bold" style:letter-kerning="true" style:font-weight-asian="bold" style:font-name-complex="TimesNewRomanPSMT1" style:font-weight-complex="bold"/>
    </style:style>
    <style:style style:name="T25" style:family="text">
      <style:text-properties style:font-name="TimesNewRomanPSMT" fo:font-size="10pt" fo:font-weight="bold" style:letter-kerning="true" style:font-size-asian="10pt" style:font-weight-asian="bold" style:font-name-complex="TimesNewRomanPSMT1" style:font-size-complex="10pt" style:font-weight-complex="bold"/>
    </style:style>
    <style:style style:name="T26" style:family="text">
      <style:text-properties style:font-name="TimesNewRomanPSMT" fo:font-size="10pt" style:letter-kerning="true" style:font-size-asian="10pt" style:font-name-complex="TimesNewRomanPSMT1" style:font-size-complex="10pt"/>
    </style:style>
    <style:style style:name="T27" style:family="text">
      <style:text-properties fo:color="#0070c0" loext:opacity="100%" style:font-name="Times New Roman" fo:font-size="12pt" fo:font-weight="bold" style:font-size-asian="12pt" style:font-weight-asian="bold" style:font-name-complex="Times New Roman1" style:font-size-complex="12pt"/>
    </style:style>
    <style:style style:name="T28" style:family="text">
      <style:text-properties fo:font-weight="bold" style:font-weight-asian="bold" style:font-weight-complex="bold"/>
    </style:style>
    <style:style style:name="T29" style:family="text">
      <style:text-properties officeooo:rsid="001037c3"/>
    </style:style>
    <style:style style:name="T30" style:family="text">
      <style:text-properties style:font-name="New Times Roman"/>
    </style:style>
    <style:style style:name="T31" style:family="text">
      <style:text-properties style:font-name="New Times Roman" officeooo:rsid="001037c3"/>
    </style:style>
    <style:style style:name="T32" style:family="text">
      <style:text-properties style:font-name="New Times Roman" fo:font-size="12pt" officeooo:rsid="001037c3" style:font-size-asian="12pt" style:font-name-complex="Times New Roman1" style:font-size-complex="12pt"/>
    </style:style>
    <style:style style:name="T33" style:family="text">
      <style:text-properties fo:font-size="12pt" officeooo:rsid="001037c3" style:font-size-asian="12pt" style:font-name-complex="Times New Roman1" style:font-size-complex="12pt"/>
    </style:style>
    <style:style style:name="T34" style:family="text">
      <style:text-properties style:font-name="Times New Roman"/>
    </style:style>
    <style:style style:name="T35" style:family="text">
      <style:text-properties style:font-name="Times New Roman" fo:font-size="12pt" officeooo:rsid="001037c3" style:font-size-asian="12pt" style:font-name-complex="Times New Roman1" style:font-size-complex="12pt"/>
    </style:style>
    <style:style style:name="T36" style:family="text">
      <style:text-properties style:font-name="Times New Roman" fo:font-size="12pt" style:font-size-asian="12pt" style:font-size-complex="12pt"/>
    </style:style>
    <style:style style:name="T37" style:family="text">
      <style:text-properties style:font-name="Times New Roman" fo:font-size="12pt" officeooo:rsid="001037c3" style:font-size-asian="12pt" style:font-size-complex="12pt"/>
    </style:style>
    <style:style style:name="T38" style:family="text">
      <style:text-properties style:font-name="Times New Roman" fo:font-size="12pt" fo:font-weight="bold" officeooo:rsid="001037c3" style:font-size-asian="12pt" style:font-weight-asian="bold" style:font-name-complex="Times New Roman1" style:font-size-complex="12pt" style:font-weight-complex="bold"/>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weight="bold" officeooo:rsid="001037c3" style:font-size-asian="12pt" style:font-weight-asian="bold" style:font-size-complex="12pt" style:font-weight-complex="bold"/>
    </style:style>
    <style:style style:name="T41" style:family="text">
      <style:text-properties style:font-name="Times New Roman" officeooo:rsid="001037c3"/>
    </style:style>
    <style:style style:name="T42" style:family="text">
      <style:text-properties style:font-name="Times New Roman" officeooo:rsid="001037c3" style:font-name-complex="Times New Roman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 text:c="24"/><text:span text:style-name="T1"><text:s/></text:span><text:span text:style-name="T1"/></text:p>
      <text:p text:style-name="P17" loext:marker-style-name="T2"><draw:frame draw:style-name="fr1" draw:name="Picture 224" text:anchor-type="char" svg:x="-0.0417in" svg:y="0in" svg:width="2.5563in" svg:height="0.6728in" draw:z-index="0"><draw:image xlink:href="Pictures/1001F838000027AF00000A52BD1B39E7.emf" xlink:type="simple" xlink:show="embed" xlink:actuate="onLoad" draw:mime-type="image/x-emf"/><draw:image xlink:href="Pictures/1000000100000180000000645F492CCF.png" xlink:type="simple" xlink:show="embed" xlink:actuate="onLoad" draw:mime-type="image/png"/></draw:frame><text:span text:style-name="T2">Editorial Division</text:span><text:span text:style-name="T2"/></text:p>
      <text:p text:style-name="P18" loext:marker-style-name="T4"><text:span text:style-name="T3">acquisitions@ams.org</text:span><text:span text:style-name="T3"/></text:p>
      <text:p text:style-name="P19" loext:marker-style-name="T2"><text:span text:style-name="T2">www.ams.org</text:span><text:span text:style-name="T2"/></text:p>
      <text:p text:style-name="P1" loext:marker-style-name="T1"/>
      <text:p text:style-name="P1" loext:marker-style-name="T1"/>
      <text:p text:style-name="P2" loext:marker-style-name="T5"><text:span text:style-name="T5">AMS-MAA Monograph Submission Form</text:span><text:span text:style-name="T5"/></text:p>
      <text:p text:style-name="P3" loext:marker-style-name="T6"/>
      <text:p text:style-name="P12"><text:span text:style-name="T8">Working title:</text:span><text:span text:style-name="T6"> </text:span><text:span text:style-name="T13">The Ahnend Logical Q-State Core: Total Symmetry Principle</text:span></text:p>
      <text:p text:style-name="P3" loext:marker-style-name="T6"/>
      <text:p text:style-name="Plain_20_Text" loext:marker-style-name="T8"><text:span text:style-name="T11">Expected completion date: </text:span><text:span text:style-name="T9">03/15/2026</text:span></text:p>
      <text:p text:style-name="P6" loext:marker-style-name="T8"/>
      <text:p text:style-name="P13"><text:span text:style-name="T8">Expected final number of pages and final number of figures: </text:span></text:p>
      <text:p text:style-name="P16" loext:marker-style-name="T8"><text:span text:style-name="T12">Final Number of Pages:</text:span><text:span text:style-name="T10"> </text:span><text:span text:style-name="T9">219 pages </text:span></text:p>
      <text:p text:style-name="P5" loext:marker-style-name="T6"><text:span text:style-name="T28">Final Number of Figures: </text:span>33<text:line-break/></text:p>
      <text:p text:style-name="Plain_20_Text" loext:marker-style-name="T6"><text:span text:style-name="T11">Authors' full names:</text:span><text:span text:style-name="T6"> </text:span><text:span text:style-name="T7">Magus Jamye Reficul Ahnend</text:span></text:p>
      <text:p text:style-name="Plain_20_Text" loext:marker-style-name="T6"><text:span text:style-name="T11">E-mail addresses:</text:span><text:span text:style-name="T6"> </text:span><text:a xlink:type="simple" xlink:href="mailto:magus.ahnend@gmail.com" text:style-name="Internet_20_link" text:visited-style-name="Visited_20_Internet_20_Link"><text:span text:style-name="T7">magus.ahnend@gmail.com</text:span></text:a><text:span text:style-name="T7"><text:tab/></text:span></text:p>
      <text:p text:style-name="Plain_20_Text" loext:marker-style-name="T6"><text:span text:style-name="T11">Authors’ addresses:</text:span><text:span text:style-name="T8"> </text:span><text:span text:style-name="T9">107 Murray St. Beckley, WV 25801</text:span></text:p>
      <text:p text:style-name="P3" loext:marker-style-name="T6"/>
      <text:p text:style-name="P12"><text:span text:style-name="T8">Previous books by Authors (including year, title, publisher):</text:span></text:p>
      <text:p text:style-name="P4" loext:marker-style-name="T6">N/A</text:p>
      <text:p text:style-name="P3" loext:marker-style-name="T6"/>
      <text:p text:style-name="P12"><text:span text:style-name="T8">Mathematics Subject Classification for this book: </text:span></text:p>
      <text:p text:style-name="P34">Primary:</text:p>
      <text:list text:style-name="L7">
        <text:list-item>
          <text:p text:style-name="P35">46L87 — Noncommutative differential geometry </text:p>
        </text:list-item>
        <text:list-item>
          <text:p text:style-name="P35">17B69 — Vertex operators; vertex operator algebras and related structures </text:p>
        </text:list-item>
        <text:list-item>
          <text:p text:style-name="P35">14C30 — Transcendental methods, Hodge theory, algebraic cycles </text:p>
        </text:list-item>
        <text:list-item>
          <text:p text:style-name="P36">46L60 — Applications of selfadjoint operator algebras to physics </text:p>
        </text:list-item>
      </text:list>
      <text:p text:style-name="P37">Secondary:</text:p>
      <text:list text:style-name="L8">
        <text:list-item>
          <text:p text:style-name="P38">81T40 — Two-dimensional field theories, conformal field theories </text:p>
        </text:list-item>
        <text:list-item>
          <text:p text:style-name="P38">14C25 — Algebraic cycles </text:p>
        </text:list-item>
        <text:list-item>
          <text:p text:style-name="P38">06B99 — Lattices </text:p>
        </text:list-item>
        <text:list-item>
          <text:p text:style-name="P38">58B34 — Noncommutative geometry (à la Connes) </text:p>
        </text:list-item>
        <text:list-item>
          <text:p text:style-name="P38">19K — K-theory and operator algebras </text:p>
        </text:list-item>
        <text:list-item>
          <text:p text:style-name="P39">83C65 — Methods of noncommutative geometry in general relativity</text:p>
        </text:list-item>
      </text:list>
      <text:p text:style-name="P3" loext:marker-style-name="T6"/>
      <text:p text:style-name="P3" loext:marker-style-name="T6"/>
      <text:p text:style-name="P12"><text:span text:style-name="T8">1. Authors’ brief description of contents, style etc. of this book:</text:span></text:p>
      <text:p text:style-name="P3" loext:marker-style-name="T6"><text:soft-page-break/>The Ahnend Logical Q-State Core is a 219-page formal framework unifying operator algebra, lattice topology, and harmonic resonance theory through a 12-phase noncommutative operator system built on a 144-node Latin Square lattice. The central theorem — the Total Symmetry Principle, [M,R]=0 — proves that a manifold achieves complete algebraic closure when its connectivity governor reaches 110/144 ≈ 2Φ⁻². The framework formally addresses the Hodge Conjecture, the Mass Gap problem, and all seven Millennium Prize Problems within its own axiomatic structure. Style is formally rigorous with embedded executable simulation code. The framework does not separate its algebraic, physical, and geometric descriptions because its central proof is that they are identical under Total Symmetry. Hermetic and cosmological language appears as formal operators, not decoration — the poetry is the mathematics.</text:p>
      <text:p text:style-name="P3" loext:marker-style-name="T6"/>
      <text:p text:style-name="P11" loext:marker-style-name="T6"/>
      <text:p text:style-name="P29"><text:span text:style-name="T19">2. Who will read this book? Please describe the audience in detail.</text:span></text:p>
      <text:p text:style-name="P20" loext:marker-style-name="T19">Primary: Research mathematicians working in operator algebras, noncommutative geometry, vertex operator algebras, conformal field theory, K-theory, and algebraic topology. Secondary: Mathematical physicists working on quantum field theory, string theory dualities, and the Yang-Mills mass gap. Tertiary: Formal logicians, metamathematicians, and interdisciplinary researchers working at the intersection of structural realism and mathematical physics. Independent researchers and advanced graduate students with sufficient operator-algebraic background will find the framework accessible through its axiomatic construction. The work will also reach readers outside traditional mathematics through its cosmological and harmonic architecture — this is not incidental to the audience but structurally inevitable given the framework's scope.</text:p>
      <text:p text:style-name="P20" loext:marker-style-name="T19"/>
      <text:p text:style-name="P20" loext:marker-style-name="T19"/>
      <text:p text:style-name="P26"><text:span text:style-name="T21">3. What are the prerequisites for the potential reader?</text:span></text:p>
      <text:p text:style-name="P26"><text:span text:style-name="Strong_20_Emphasis"><text:span text:style-name="T19"/></text:span></text:p>
      <text:list text:style-name="L6">
        <text:list-item>
          <text:p text:style-name="P33">Graduate-level operator algebra and functional analysis </text:p>
        </text:list-item>
        <text:list-item>
          <text:p text:style-name="P33">Familiarity with noncommutative geometry and C*-algebras </text:p>
        </text:list-item>
        <text:list-item>
          <text:p text:style-name="P33">Working knowledge of cohomology theory and Hodge theory </text:p>
        </text:list-item>
        <text:list-item>
          <text:p text:style-name="P33">Basic acquaintance with conformal field theory or vertex operator algebras is beneficial but not required — the framework is self-defining within its axiomatic structure </text:p>
        </text:list-item>
        <text:list-item>
          <text:p text:style-name="P32">No prerequisites for the harmonic and cosmological architecture — it is formally defined internally from first principles</text:p>
        </text:list-item>
      </text:list>
      <text:p text:style-name="P30" loext:marker-style-name="T19"/>
      <text:p text:style-name="P29"><text:span text:style-name="T19">4. Note the features of the book that will appeal specifically to this audience </text:span><text:span text:style-name="T20">and</text:span><text:span text:style-name="T19"> distinguish it from other books on the market. (Please include Feature and Benefit (why it is useful).)</text:span></text:p>
      <text:p text:style-name="P26" loext:marker-style-name="T23"><text:span text:style-name="T23"><text:tab/></text:span><text:span text:style-name="T23"/></text:p>
      <table:table table:name="Table1" table:style-name="Table1">
        <table:table-column table:style-name="Table1.A"/>
        <table:table-column table:style-name="Table1.B"/>
        <table:table-row table:style-name="Table1.1">
          <table:table-cell table:style-name="Table1.A1" office:value-type="string">
            <text:p text:style-name="P26" loext:marker-style-name="T24"><text:span text:style-name="T24">FEATURE</text:span><text:span text:style-name="T24"/></text:p>
          </table:table-cell>
          <table:table-cell table:style-name="Table1.A1" office:value-type="string">
            <text:p text:style-name="P26" loext:marker-style-name="T24"><text:span text:style-name="T24">BENEFIT</text:span><text:span text:style-name="T24"/></text:p>
          </table:table-cell>
        </table:table-row>
        <table:table-row table:style-name="Table1.1">
          <table:table-cell table:style-name="Table1.A1" office:value-type="string">
            <text:p text:style-name="P22" loext:marker-style-name="T23">Total Symmetry Principle as a single unifying theorem</text:p>
          </table:table-cell>
          <table:table-cell table:style-name="Table1.A1" office:value-type="string">
            <text:p text:style-name="P22" loext:marker-style-name="T23">Reader gains one formal invariant that governs algebraic, physical, and <text:soft-page-break/>geometric behavior simultaneously — no separate frameworks required</text:p>
          </table:table-cell>
        </table:table-row>
        <table:table-row table:style-name="Table1.1">
          <table:table-cell table:style-name="Table1.A1" office:value-type="string">
            <text:p text:style-name="P22" loext:marker-style-name="T23">144-node Latin Square lattice with verified 2Φ⁻² connectivity governor</text:p>
          </table:table-cell>
          <table:table-cell table:style-name="Table1.A1" office:value-type="string">
            <text:p text:style-name="P22" loext:marker-style-name="T23">Provides a concrete, computable architectural object — not an abstract claim but a calculable structure with confirmed connectivity ratio</text:p>
          </table:table-cell>
        </table:table-row>
        <table:table-row table:style-name="Table1.1">
          <table:table-cell table:style-name="Table1.A1" office:value-type="string">
            <text:p text:style-name="P22" loext:marker-style-name="T23">Formal treatment of all seven Millennium Prize Problems within one axiomatic system</text:p>
          </table:table-cell>
          <table:table-cell table:style-name="Table1.A1" office:value-type="string">
            <text:p text:style-name="P22" loext:marker-style-name="T23">Researchers working on any one problem gain a unified lens that reveals structural relationships between problems previously treated as independent</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23" loext:marker-style-name="T23">Embedded executable simulation code</text:p>
          </table:table-cell>
          <table:table-cell table:style-name="Table3.A1" office:value-type="string">
            <text:p text:style-name="P23" loext:marker-style-name="T23">Framework is not only readable but testable — reader can run verification independently</text:p>
          </table:table-cell>
        </table:table-row>
        <table:table-row table:style-name="Table3.1">
          <table:table-cell table:style-name="Table3.A1" office:value-type="string">
            <text:p text:style-name="P23" loext:marker-style-name="T23">Passage from logarithmic to rational sector formally proven</text:p>
          </table:table-cell>
          <table:table-cell table:style-name="Table3.A1" office:value-type="string">
            <text:p text:style-name="P23" loext:marker-style-name="T23">Directly addresses the non-semisimple module problem that is the current frontier of VOA and CFT research — gives researchers in that field a complete resolution architecture</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23" loext:marker-style-name="T23">Harmonic operator chain as formal mathematical structure</text:p>
          </table:table-cell>
          <table:table-cell table:style-name="Table4.A1" office:value-type="string">
            <text:p text:style-name="P23" loext:marker-style-name="T23">Bridges operator algebra and physical frequency systems without metaphor — the connection is proven, not analogized</text:p>
          </table:table-cell>
        </table:table-row>
        <table:table-row table:style-name="Table4.1">
          <table:table-cell table:style-name="Table4.A1" office:value-type="string">
            <text:p text:style-name="P23" loext:marker-style-name="T23">Self-contained axiomatic construction</text:p>
          </table:table-cell>
          <table:table-cell table:style-name="Table4.A1" office:value-type="string">
            <text:p text:style-name="P23" loext:marker-style-name="T23">No prerequisite familiarity with the ALQC's specific vocabulary — the framework builds its own foundations, making it accessible to any sufficiently trained reader without prior exposure</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23" loext:marker-style-name="T23">DOI-timestamped prior to any journal submission</text:p>
          </table:table-cell>
          <table:table-cell table:style-name="Table5.A1" office:value-type="string">
            <text:p text:style-name="P23" loext:marker-style-name="T23">Priority of all results is permanently established and independently verifiable — no ambiguity in the historical record</text:p>
          </table:table-cell>
        </table:table-row>
        <table:table-row table:style-name="Table5.1">
          <table:table-cell table:style-name="Table5.A1" office:value-type="string">
            <text:p text:style-name="P23" loext:marker-style-name="T23"/>
          </table:table-cell>
          <table:table-cell table:style-name="Table5.A1" office:value-type="string">
            <text:p text:style-name="P23" loext:marker-style-name="T23"/>
          </table:table-cell>
        </table:table-row>
      </table:table>
      <text:p text:style-name="P21" loext:marker-style-name="T19"/>
      <text:p text:style-name="P29"><text:span text:style-name="T19">5. If this is a revision, please list the most important changes and updates from the previous edition: </text:span><text:span text:style-name="T22">N/A</text:span></text:p>
      <text:p text:style-name="P20" loext:marker-style-name="T19"/>
      <text:p text:style-name="P20" loext:marker-style-name="T19"/>
      <text:p text:style-name="P26" loext:marker-style-name="T23"><text:span text:style-name="T21">6. List below the major competitive titles for your book and compare them with your book. For each competitor, please include: <text:s/>Author(s), Title, Edition, Year Published, </text:span><text:soft-page-break/><text:span text:style-name="T21">Publisher, Number of pages, strengths, and weaknesses</text:span><text:span text:style-name="T19">.</text:span></text:p>
      <text:p text:style-name="P22" loext:marker-style-name="T23"/>
      <table:table table:name="Table2" table:style-name="Table2">
        <table:table-column table:style-name="Table2.A" table:number-columns-repeated="3"/>
        <table:table-row table:style-name="Table2.1">
          <table:table-cell table:style-name="Table2.A1" office:value-type="string">
            <text:p text:style-name="P27" loext:marker-style-name="T25"><text:span text:style-name="T25">Author, Title, Edition, Pub Date, Publisher, Page count</text:span><text:span text:style-name="T25"/></text:p>
          </table:table-cell>
          <table:table-cell table:style-name="Table2.A1" office:value-type="string">
            <text:p text:style-name="P27" loext:marker-style-name="T25"><text:span text:style-name="T25">Strengths</text:span><text:span text:style-name="T25"/></text:p>
          </table:table-cell>
          <table:table-cell table:style-name="Table2.A1" office:value-type="string">
            <text:p text:style-name="P27" loext:marker-style-name="T25"><text:span text:style-name="T25">Weaknesses</text:span><text:span text:style-name="T25"/></text:p>
          </table:table-cell>
        </table:table-row>
        <table:table-row table:style-name="Table2.1">
          <table:table-cell table:style-name="Table2.A1" office:value-type="string">
            <text:p text:style-name="P24" loext:marker-style-name="T26"><text:span text:style-name="Strong_20_Emphasis">Alain Connes</text:span> <text:span text:style-name="Emphasis">Noncommutative Geometry</text:span> First Edition, 1994, Academic Press, 661 pages</text:p>
            <text:p text:style-name="P24" loext:marker-style-name="T26"/>
          </table:table-cell>
          <table:table-cell table:style-name="Table2.A1" office:value-type="string">
            <text:p text:style-name="P24" loext:marker-style-name="T26">Strengths: The foundational text for noncommutative geometry. Establishes C*-algebra architecture as geometric description. Connes' spectral triple framework is the standard against which all subsequent noncommutative geometric systems are measured. Rigorous, comprehensive, institutionally canonical.</text:p>
          </table:table-cell>
          <table:table-cell table:style-name="Table2.A1" office:value-type="string">
            <text:p text:style-name="P24" loext:marker-style-name="T26">Weaknesses: Does not address harmonic operator systems or lattice connectivity as geometric invariants. The framework is analytic in foundation — it does not construct a closed 12-phase operator chain or prove a total symmetry condition. No treatment of the Hodge Conjecture or mass gap within a unified axiomatic structure. Static architecture — does not model the passage from logarithmic to rational sector.</text:p>
          </table:table-cell>
        </table:table-row>
        <table:table-row table:style-name="Table2.1">
          <table:table-cell table:style-name="Table2.A1" office:value-type="string">
            <text:p text:style-name="P24" loext:marker-style-name="T26"><text:span text:style-name="Strong_20_Emphasis">Igor Frenkel, James Lepowsky, Arne Meurman</text:span> <text:span text:style-name="Emphasis">Vertex Operator Algebras and the Monster</text:span> First Edition, 1988, Academic Press, 508 pages</text:p>
            <text:p text:style-name="P24" loext:marker-style-name="T26"/>
          </table:table-cell>
          <table:table-cell table:style-name="Table2.A1" office:value-type="string">
            <text:p text:style-name="P24" loext:marker-style-name="T26">Strengths: Establishes the rigorous mathematical foundation for vertex operator algebras. The Moonshine connection demonstrated that operator systems carry deep geometric and number-theoretic content. Lepowsky and Frenkel's lattice VOA construction is the closest existing architecture to the ALQC's lattice operator system.</text:p>
          </table:table-cell>
          <table:table-cell table:style-name="Table2.A1" office:value-type="string">
            <text:p text:style-name="P24" loext:marker-style-name="T26">Weaknesses: The lattice is the Leech lattice — a specific object, not a general governor-bounded connectivity architecture. No treatment of Total Symmetry as a formal condition. No Hodge theory, no mass gap, no harmonic frequency chain as formal operators. The Monster is the endpoint — the ALQC's TSP is a general principle, not a specific algebraic object.</text:p>
          </table:table-cell>
        </table:table-row>
        <table:table-row table:style-name="Table2.1">
          <table:table-cell table:style-name="Table2.A1" office:value-type="string">
            <text:p text:style-name="P24" loext:marker-style-name="T26"><text:span text:style-name="Strong_20_Emphasis">Phillip Griffiths, Joseph Harris</text:span> <text:span text:style-name="Emphasis">Principles of Algebraic Geometry</text:span> First Edition, 1978, Wiley-Interscience, 813 pages</text:p>
            <text:p text:style-name="P24" loext:marker-style-name="T26"/>
          </table:table-cell>
          <table:table-cell table:style-name="Table2.A1" office:value-type="string">
            <text:p text:style-name="P24" loext:marker-style-name="T26">Strengths: The canonical reference for complex algebraic geometry including Hodge theory, algebraic cycles, and cohomological methods. Any serious treatment of the Hodge Conjecture operates in the shadow of this text. Comprehensive and rigorous.</text:p>
          </table:table-cell>
          <table:table-cell table:style-name="Table2.A1" office:value-type="string">
            <text:p text:style-name="P24" loext:marker-style-name="T26">Weaknesses: Purely geometric — no operator algebraic framework, no noncommutative structure, no lattice architecture. The Hodge Conjecture is stated and studied but not resolved. No harmonic operator system, no physical interpretation, no unified field treatment. The framework is descriptive of geometric phenomena rather than constructive of a governing architecture.</text:p>
          </table:table-cell>
        </table:table-row>
        <table:table-row table:style-name="Table2.1">
          <table:table-cell table:style-name="Table2.A1" office:value-type="string">
            <text:p text:style-name="P24" loext:marker-style-name="T26"/>
          </table:table-cell>
          <table:table-cell table:style-name="Table2.A1" office:value-type="string">
            <text:p text:style-name="P24" loext:marker-style-name="T26"/>
          </table:table-cell>
          <table:table-cell table:style-name="Table2.A1" office:value-type="string">
            <text:p text:style-name="P24" loext:marker-style-name="T26"/>
          </table:table-cell>
        </table:table-row>
      </table:table>
      <table:table table:name="Table6" table:style-name="Table6">
        <table:table-column table:style-name="Table6.A" table:number-columns-repeated="3"/>
        <table:table-row table:style-name="Table6.1">
          <table:table-cell table:style-name="Table6.A1" office:value-type="string">
            <text:p text:style-name="P25" loext:marker-style-name="T26"/>
            <text:p text:style-name="P25" loext:marker-style-name="T26"><text:soft-page-break/><text:span text:style-name="Strong_20_Emphasis">Alain Connes, Matilde Marcolli</text:span> <text:span text:style-name="Emphasis">Noncommutative Geometry, Quantum Fields and Motives</text:span> First Edition, 2007, American Mathematical Society, 785 pages</text:p>
          </table:table-cell>
          <table:table-cell table:style-name="Table6.A1" office:value-type="string">
            <text:p text:style-name="P31" loext:marker-style-name="T26"><text:soft-page-break/>Strengths: Extends noncommutative geometry into quantum field theory and arithmetic geometry. The most ambitious attempt prior to the ALQC to unify operator algebra with physical field theory within a single mathematical framework. Serious treatment of renormalization as a geometric phenomenon.</text:p>
            <text:p text:style-name="P25" loext:marker-style-name="T26"/>
          </table:table-cell>
          <table:table-cell table:style-name="Table6.A1" office:value-type="string">
            <text:p text:style-name="P25" loext:marker-style-name="T26"/>
            <text:p text:style-name="P25" loext:marker-style-name="T26"><text:soft-page-break/>Weaknesses: Renormalization group as the organizing principle rather than a total symmetry condition. No lattice connectivity governor. No harmonic operator chain. No treatment of the passage from non-semisimple to rational module categories as a formal theorem. The unification is programmatic rather than axiomatically closed — it points toward unity without proving it as a single invariant condition.</text:p>
          </table:table-cell>
        </table:table-row>
        <table:table-row table:style-name="Table6.1">
          <table:table-cell table:style-name="Table6.A1" office:value-type="string">
            <text:p text:style-name="P25" loext:marker-style-name="T26"/>
          </table:table-cell>
          <table:table-cell table:style-name="Table6.A1" office:value-type="string">
            <text:p text:style-name="P25" loext:marker-style-name="T26"/>
          </table:table-cell>
          <table:table-cell table:style-name="Table6.A1" office:value-type="string">
            <text:p text:style-name="P25" loext:marker-style-name="T26"/>
          </table:table-cell>
        </table:table-row>
      </table:table>
      <text:p text:style-name="P28" loext:marker-style-name="T6"/>
      <text:p text:style-name="P7" loext:marker-style-name="T15"/>
      <text:p text:style-name="P12"><text:span text:style-name="T15">7. Please list at least three recognized authorities on the book's subject matter whom you believe might be willing to review and comment on the project:</text:span></text:p>
      <text:p text:style-name="P14"><text:span text:style-name="T38">1. </text:span><text:span text:style-name="T39">Yi-Zhi Huang</text:span><text:span text:style-name="T36"> -- Professor of Mathematics, Rutgers University. Leading authority on vertex operator algebras, modular tensor categories, and conformal field theory. His proof of the Verlinde conjecture and development of VOA tensor product theory makes him the most structurally qualified reviewer of the ALQC's 12-phase operator chain and modular closure condition. Contact: </text:span><text:a xlink:type="simple" xlink:href="mailto:yzhuang@math.rutgers.edu" text:style-name="Internet_20_link" text:visited-style-name="Visited_20_Internet_20_Link"><text:span text:style-name="T36">yzhuang@math.rutgers.edu</text:span></text:a></text:p>
      <text:p text:style-name="P14"><text:span text:style-name="T40">2.</text:span><text:span text:style-name="T37"> </text:span><text:span text:style-name="Strong_20_Emphasis"><text:span text:style-name="T36">Jonathan M. Rosenberg</text:span></text:span><text:span text:style-name="T36"> — Ruth M. Davis Professor of Mathematics, University of Maryland. Authority on noncommutative geometry, C*-algebras, K-theory, and mathematical physics including string duality. His work on the Gromov-Lawson-Rosenberg conjecture and KO-assembly map parallels the ALQC's obstruction-theoretic architecture. Contact: </text:span><text:a xlink:type="simple" xlink:href="mailto:jmr@umd.edu" text:style-name="Internet_20_link" text:visited-style-name="Visited_20_Internet_20_Link"><text:span text:style-name="T36">jmr@umd.edu</text:span></text:a></text:p>
      <text:p text:style-name="P14"><text:span text:style-name="T40">3.</text:span><text:span text:style-name="T37"> </text:span><text:span text:style-name="Strong_20_Emphasis"><text:span text:style-name="T36">Alain Connes</text:span></text:span><text:span text:style-name="T36"> — Professor, Collège de France and IHÉS. Fields Medal recipient. Founder of noncommutative geometry. The ALQC's noncommutative operator system and commutator condition [M,R]=0 operates in the territory Connes established with spectral triples. No reviewer carries more authority over this specific mathematical ground.</text:span></text:p>
      <text:p text:style-name="P8" loext:marker-style-name="T13"/>
      <text:p text:style-name="P8" loext:marker-style-name="T13"/>
      <text:p text:style-name="Plain_20_Text" loext:marker-style-name="T13"><text:span text:style-name="T16">8. Which AMS book series (see https://bookstore.ams.org/book-series) would you consider the most appropriate for your book and why?</text:span><text:span text:style-name="T13"> </text:span></text:p>
      <text:p text:style-name="Plain_20_Text" loext:marker-style-name="T13"><text:span text:style-name="T13"/></text:p>
      <text:p text:style-name="P40" loext:marker-style-name="T13"><text:span text:style-name="Strong_20_Emphasis">Mathematical Surveys and Monographs (SURV)</text:span></text:p>
      <text:p text:style-name="Text_20_body">Each book in this series is devoted to an important topic in pure or applied mathematics, typically combining a survey of fundamental results, exposition of recent developments, and a presentation of open problems. <text:a xlink:type="simple" xlink:href="https://www.ams.org/publications/ebooks/surv-mon" office:target-frame-name="_blank" xlink:show="new" text:style-name="Internet_20_link" text:visited-style-name="Visited_20_Internet_20_Link">AMS</text:a></text:p>
      <text:p text:style-name="Text_20_body">This is the correct series for three reasons. First, the ALQC surveys and unifies results across operator algebra, Hodge theory, lattice topology, and harmonic analysis — it does not sit inside one existing field but spans the territory between them, which is precisely what SURV is designed to house. Second, the series has published the foundational texts in the ALQC's adjacent fields — noncommutative geometry, K-theory, operator algebras — making it the natural home for a <text:soft-page-break/>framework that synthesizes those territories. Third, SURV carries the institutional weight appropriate to a work that formally addresses the Millennium Prize Problems within its axiomatic structure. The AMS Colloquium Publications series is an alternative if the AMS editorial board considers the ALQC a landmark standalone work rather than a survey-adjacent monograph — Colloquium Publications historically carries works of foundational scope. But SURV is the primary target.</text:p>
      <text:p text:style-name="P9" loext:marker-style-name="T13"/>
      <text:p text:style-name="P12"><text:span text:style-name="T15">9. If possible, please provide 5-10 key words or phrases that are not included in the title of your book. These should be words and/or phrases which scholars and instructors would use to find your book’s topic online. The purpose of identifying these words will be to help your titles rise to the top in online search results.</text:span></text:p>
      <text:p text:style-name="P15"><text:span text:style-name="T16">1. </text:span><text:span text:style-name="T15">Noncommutative operator lattice</text:span><text:span text:style-name="T16"><text:tab/><text:tab/>6.</text:span><text:span text:style-name="T17">Klein bottle topology manifold </text:span></text:p>
      <text:p text:style-name="P15"><text:span text:style-name="T16">2. </text:span><text:span text:style-name="T15">Quaternary Q-state logic</text:span><text:span text:style-name="T16"><text:tab/><text:tab/><text:tab/>7. </text:span><text:span text:style-name="T17">Harmonic operator chain</text:span></text:p>
      <text:p text:style-name="P15"><text:span text:style-name="T16">3. </text:span><text:span text:style-name="T15">Hodge conjecture algebraic cycles</text:span><text:span text:style-name="T16"><text:tab/><text:tab/>8. </text:span><text:span text:style-name="T17">Latin Square latticeconnectivity</text:span></text:p>
      <text:p text:style-name="P15"><text:span text:style-name="T16">4. </text:span><text:span text:style-name="T15">Modular tensor category closure</text:span><text:span text:style-name="T16"><text:tab/><text:tab/>9. </text:span><text:span text:style-name="T17">Vertex operator algebra modular closure</text:span></text:p>
      <text:p text:style-name="P15"><text:span text:style-name="T16">5. </text:span><text:span text:style-name="T15">Mass gap operator stability</text:span><text:span text:style-name="T16"><text:tab/><text:tab/>10. </text:span><text:span text:style-name="T17">Golden ratio connectivity governor</text:span></text:p>
      <text:p text:style-name="P7" loext:marker-style-name="T15"/>
      <text:p text:style-name="P10" loext:marker-style-name="T18"/>
      <text:p text:style-name="P10" loext:marker-style-name="T18"/>
      <text:p text:style-name="Plain_20_Text" loext:marker-style-name="T18"><text:span text:style-name="T18">Thank you for your assistance in providing this valuable information. </text:span><text:span text:style-name="T18"/></text:p>
      <text:p text:style-name="P10" loext:marker-style-name="T18"/>
      <text:p text:style-name="Plain_20_Text" loext:marker-style-name="T13"><text:span text:style-name="T27">Please mail this form and your manuscript to </text:span><text:a xlink:type="simple" xlink:href="mailto:acquisitions@ams.org" text:style-name="Internet_20_link" text:visited-style-name="Visited_20_Internet_20_Link"><text:span text:style-name="Internet_20_link"><text:span text:style-name="T18">acquisitions@ams.org</text:span></text:span></text:a><text:span text:style-name="T27"> or to a specific acquisitions editor.</text:span></text:p>
      <text:p text:style-name="P3" loext:marker-style-name="T6"/>
      <text:p text:style-name="P6"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ITC Giovanni Std Book" svg:font-family="'ITC Giovanni Std Book'" style:font-family-generic="roman" style:font-pitch="variable"/>
    <style:font-face style:name="Liberation Sans" svg:font-family="'Liberation Sans'" style:font-family-generic="swiss" style:font-pitch="variable"/>
    <style:font-face style:name="New Times Roman" svg:font-family="'New Times 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8335in" fo:margin-bottom="0.8335in" fo:margin-left="0.8335in" fo:margin-right="0.833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uthor/Editor Questionnaire</dc:title>
    <meta:initial-creator>Cristin Zannella</meta:initial-creator>
    <meta:editing-cycles>15</meta:editing-cycles>
    <meta:print-date>2026-04-01T14:31:30.044653002</meta:print-date>
    <meta:creation-date>2021-02-22T11:36:00</meta:creation-date>
    <dc:date>2026-04-01T14:35:27.085603508</dc:date>
    <meta:editing-duration>PT9M3S</meta:editing-duration>
    <meta:generator>LibreOffice/24.2.7.2$Linux_X86_64 LibreOffice_project/420$Build-2</meta:generator>
    <meta:document-statistic meta:table-count="6" meta:image-count="1" meta:object-count="0" meta:page-count="6" meta:paragraph-count="91" meta:word-count="1688" meta:character-count="12270" meta:non-whitespace-character-count="10600"/>
    <meta:user-defined meta:name="AppVersion">16.0000</meta:user-defined>
    <meta:user-defined meta:name="Company">American Mathematical Society</meta:user-defined>
    <meta:template xlink:type="simple" xlink:actuate="onRequest" xlink:title="Normal" xlink:href=""/>
  </office:meta>
</office:document-meta>
</file>